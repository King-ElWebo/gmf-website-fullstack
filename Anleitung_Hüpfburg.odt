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54000004B4F126F5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end" style:justify-single-word="false" fo:background-color="#ffffff">
        <style:background-image/>
      </style:paragraph-properties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2" text:anchor-type="paragraph" svg:x="-1cm" svg:y="-0.45cm" svg:width="19.002cm" draw:z-index="0"><draw:text-box fo:min-height="27.665cm"><text:p text:style-name="P1"><draw:frame draw:style-name="fr2" draw:name="Grafik1" text:anchor-type="paragraph" svg:width="19.002cm" svg:height="27.665cm" style:rel-height="scale" draw:z-index="1"><draw:image xlink:href="Pictures/1000000000000354000004B4F126F5DA.jpg" xlink:type="simple" xlink:show="embed" xlink:actuate="onLoad"/></draw:frame>GMF EVENTTECHNI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5T07:52:18.81</meta:creation-date>
    <meta:editing-duration>P3DT11H35M8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1" meta:paragraph-count="1" meta:word-count="2" meta:character-count="16"/>
    <dc:date>2018-10-08T19:24:01.39</dc:date>
  </office:meta>
</office:document-meta>
</file>