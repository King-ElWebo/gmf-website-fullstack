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ahnschrift" svg:font-family="Bahnschrift" style:font-family-generic="swiss" style:font-pitch="variable"/>
    <style:font-face style:name="Impact" svg:font-family="Impact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Bahnschrift" fo:font-size="10.5pt" fo:font-weight="bold" style:font-size-asian="10.5pt" style:font-weight-asian="bold" style:font-size-complex="10.5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Bahnschrift" fo:font-size="10.5pt" fo:font-weight="bold" style:font-size-asian="10.5pt" style:font-weight-asian="bold" style:font-size-complex="10.5pt" style:font-weight-complex="bold"/>
    </style:style>
    <style:style style:name="P3" style:family="paragraph" style:parent-style-name="Standard">
      <style:text-properties style:font-name="Bahnschrift" fo:font-size="10.5pt" style:font-size-asian="10.5pt" style:font-size-complex="10.5pt"/>
    </style:style>
    <style:style style:name="P4" style:family="paragraph" style:parent-style-name="Standard" style:list-style-name="L1">
      <style:text-properties style:font-name="Bahnschrift" fo:font-size="10.5pt" style:font-size-asian="10.5pt" style:font-size-complex="10.5pt"/>
    </style:style>
    <style:style style:name="P5" style:family="paragraph" style:parent-style-name="Standard" style:list-style-name="L2">
      <style:text-properties style:font-name="Bahnschrift" fo:font-size="10.5pt" style:font-size-asian="10.5pt" style:font-size-complex="10.5pt"/>
    </style:style>
    <style:style style:name="P6" style:family="paragraph" style:parent-style-name="Standard" style:list-style-name="L3">
      <style:text-properties style:font-name="Bahnschrift" fo:font-size="10.5pt" style:font-size-asian="10.5pt" style:font-size-complex="10.5pt"/>
    </style:style>
    <style:style style:name="P7" style:family="paragraph" style:parent-style-name="Standard" style:list-style-name="L4">
      <style:text-properties style:font-name="Bahnschrift" fo:font-size="10.5pt" style:font-size-asian="10.5pt" style:font-size-complex="10.5pt"/>
    </style:style>
    <style:style style:name="P8" style:family="paragraph" style:parent-style-name="Standard">
      <style:paragraph-properties fo:text-align="center" style:justify-single-word="false"/>
      <style:text-properties style:font-name="Impact" fo:font-size="10.5pt" style:font-size-asian="10.5pt" style:font-size-complex="10.5pt"/>
    </style:style>
    <style:style style:name="T1" style:family="text">
      <style:text-properties fo:color="#66ff00"/>
    </style:style>
    <style:style style:name="T2" style:family="text">
      <style:text-properties fo:color="#006699"/>
    </style:style>
    <style:style style:name="T3" style:family="text">
      <style:text-properties fo:color="#cc00cc"/>
    </style:style>
    <style:style style:name="T4" style:family="text">
      <style:text-properties fo:color="#ffcc00"/>
    </style:style>
    <style:style style:name="T5" style:family="text">
      <style:text-properties fo:color="#ff3300"/>
    </style:style>
    <style:style style:name="T6" style:family="text">
      <style:text-properties fo:color="#336600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Verleihbedingungen</text:p>
      <text:p text:style-name="P3"/>
      <text:p text:style-name="P3">Luftburg immer ohne Schuhe betreten, Schmuckstücke sind aus Sicherheitsgründen</text:p>
      <text:p text:style-name="P3">abzulegen.</text:p>
      <text:p text:style-name="P3"/>
      <text:p text:style-name="P3">In der Luftburg sind jegliche Speisen &amp; Getränke verboten.</text:p>
      <text:p text:style-name="P3"/>
      <text:p text:style-name="P3">Spielzeuge und spitze Stöcke, sowie andere Gegenstände dürfen niemals in die Luftburg gelangen.</text:p>
      <text:p text:style-name="P3"/>
      <text:p text:style-name="P3">Die zugelassene Kindermenge/Altersbeschränkung darf nie überschritten werden!</text:p>
      <text:p text:style-name="P3">Es dürfen auch keine Erwachsenen in die Hüpfburg!!!</text:p>
      <text:p text:style-name="P3"/>
      <text:p text:style-name="P3">Das Hinaufklettern der Luftburgwände und Springen in die Sicherheitsnetze ist nicht</text:p>
      <text:p text:style-name="P3">erlaubt.</text:p>
      <text:p text:style-name="P3"/>
      <text:p text:style-name="P3">Der Aufenthalt <text:s/>auf den Luftburgbegrenzungen/Wänden ist strengstens untersagt und führt zu Schäden für die der Mieter haftet!</text:p>
      <text:p text:style-name="P3"><text:s text:c="2"/></text:p>
      <text:p text:style-name="P3">Das Gebläse regelmäßig auf Standfestigkeit prüfen!</text:p>
      <text:p text:style-name="P3"/>
      <text:p text:style-name="P3">Der Lärmschutz des Gebläses ist genauso freizuhalten.</text:p>
      <text:p text:style-name="P3"/>
      <text:p text:style-name="P3">Hinunterziehen der Netze und der oberen Luftburgbegrenzungen ist verboten.</text:p>
      <text:p text:style-name="P3"/>
      <text:p text:style-name="P3">Eltern haben die Aufsichtspflicht und haften für ihre Kinder und deren mutwillige Beschädigungen an dem Eventmodul.</text:p>
      <text:p text:style-name="P3"/>
      <text:p text:style-name="P3">Das Eventmodul wird sauber (ausgesaugt &amp; ausgewischt) und in bestem Zustand zurückgebracht, Im Falle von starker Verschmutzung wird eine Reinigungspauschale</text:p>
      <text:p text:style-name="P3">von € 80 bei Rückgabe fällig.</text:p>
      <text:p text:style-name="P3"/>
      <text:p text:style-name="P3">Bei Beschädigung (Materialfehler unterliegen der Haftung des Verleihers) werden die Reparaturkosten <text:s/>inkl. sonstige anfallende Kosten verrechnet!</text:p>
      <text:p text:style-name="P3"/>
      <text:p text:style-name="P3">Sollte die Luftburg in nassem Zustand retourniert werden, ist eine</text:p>
      <text:p text:style-name="P3">Trocknungspauschale von € 50 zu entrichten.</text:p>
      <text:p text:style-name="P3"/>
      <text:p text:style-name="P3">Der Anhänger der zum Transport des Eventmoduls verwendet wird ist laut der StVO ordnungsgemäß zum Verwenden.</text:p>
      <text:p text:style-name="P3"/>
      <text:p text:style-name="P3">Die Ladungssicherung ist immer herzustellen und auch während der Fahrt gegebenenfalls nachzubessern.</text:p>
      <text:p text:style-name="P3"/>
      <text:p text:style-name="P3">Für den ordnungsgemäßen Zustand haftet der Vermieter bei der Übergabe. Sobald der Mieter das Fahrzeug kontrolliert und übernommen hat geht die Haft auf ihn über.</text:p>
      <text:p text:style-name="P3"/>
      <text:p text:style-name="P3">Der Mieter akzeptiert mit seiner Unterschrift die oben angeführten Verleihbedingungen voll inhaltlich und ist verpflichtet sie zu erfüllen und einzuhalten.</text:p>
      <text:p text:style-name="P3"/>
      <text:p text:style-name="P3"/>
      <text:p text:style-name="P3">Vermieter:</text:p>
      <text:p text:style-name="P3"/>
      <text:p text:style-name="P3">GMF Eventtechnik</text:p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>Auf und Abbau Anleitung der Hüpfburg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/>
      <text:p text:style-name="P8"><text:span text:style-name="T5">R</text:span> <text:span text:style-name="T1">E</text:span> <text:span text:style-name="T2">G</text:span> <text:span text:style-name="T4">E</text:span> <text:span text:style-name="T3">L</text:span> <text:span text:style-name="T6">N</text:span></text:p>
      <text:p text:style-name="P3"/>
      <text:p text:style-name="P3"/>
      <text:list xml:id="list4654925254245737383" text:style-name="L1">
        <text:list-item>
          <text:p text:style-name="P4">Schuhe ausziehen</text:p>
        </text:list-item>
      </text:list>
      <text:p text:style-name="P3"/>
      <text:list xml:id="list5465246945593540194" text:style-name="L2">
        <text:list-item>
          <text:p text:style-name="P5">Keine Getränke und Speisen</text:p>
        </text:list-item>
      </text:list>
      <text:p text:style-name="P3"/>
      <text:list xml:id="list2999007170222814157" text:style-name="L3">
        <text:list-item>
          <text:p text:style-name="P6">Kein klettern auf den Wänden</text:p>
        </text:list-item>
      </text:list>
      <text:p text:style-name="P3"/>
      <text:list xml:id="list2935287399798633388" text:style-name="L4">
        <text:list-item>
          <text:p text:style-name="P7">Keine Gegenstände in die Hüpfburg nehmen</text:p>
        </text:list-item>
      </text:list>
      <text:p text:style-name="P3"/>
      <text:list xml:id="list37318368" text:continue-numbering="true" text:style-name="L4">
        <text:list-item>
          <text:p text:style-name="P7">Eltern haften für Ihre Kinder </text:p>
        </text:list-item>
      </text:list>
      <text:p text:style-name="P3"><text:soft-page-break/></text:p>
      <text:list xml:id="list37343220" text:continue-numbering="true" text:style-name="L4">
        <text:list-item>
          <text:p text:style-name="P7"/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ahnschrift" svg:font-family="Bahnschrift" style:font-family-generic="swiss" style:font-pitch="variable"/>
    <style:font-face style:name="Impact" svg:font-family="Impact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A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AT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Frame_20_contents" style:display-name="Frame contents" style:family="paragraph" style:parent-style-name="Text_20_body" style:class="extra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4-07T11:06:21.91</meta:creation-date>
    <dc:date>2018-07-16T17:13:40.18</dc:date>
    <meta:editing-duration>PT3M54S</meta:editing-duration>
    <meta:editing-cycles>2</meta:editing-cycles>
    <meta:generator>OpenOffice/4.1.3$Win32 OpenOffice.org_project/413m1$Build-9783</meta:generator>
    <meta:document-statistic meta:table-count="0" meta:image-count="0" meta:object-count="0" meta:page-count="3" meta:paragraph-count="33" meta:word-count="288" meta:character-count="2078"/>
  </office:meta>
</office:document-meta>
</file>